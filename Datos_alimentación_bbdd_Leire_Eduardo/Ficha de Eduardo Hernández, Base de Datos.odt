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margin-top="0cm" fo:margin-bottom="0.247cm" style:contextual-spacing="false" fo:break-before="page"/>
      <style:text-properties officeooo:paragraph-rsid="0016e3e8"/>
    </style:style>
    <style:style style:name="P2" style:family="paragraph" style:parent-style-name="Heading_20_2">
      <style:paragraph-properties fo:margin-top="0cm" fo:margin-bottom="0.247cm" style:contextual-spacing="false"/>
      <style:text-properties officeooo:paragraph-rsid="0016e3e8"/>
    </style:style>
    <style:style style:name="P3" style:family="paragraph" style:parent-style-name="Standard">
      <style:paragraph-properties fo:margin-top="0cm" fo:margin-bottom="0.212cm" style:contextual-spacing="false"/>
      <style:text-properties officeooo:paragraph-rsid="0016e3e8"/>
    </style:style>
    <style:style style:name="P4" style:family="paragraph" style:parent-style-name="Heading_20_3">
      <style:text-properties officeooo:paragraph-rsid="0016e3e8"/>
    </style:style>
    <style:style style:name="P5" style:family="paragraph" style:parent-style-name="Standard">
      <style:paragraph-properties fo:margin-top="0cm" fo:margin-bottom="0.176cm" style:contextual-spacing="false"/>
      <style:text-properties officeooo:paragraph-rsid="0016e3e8"/>
    </style:style>
    <style:style style:name="P6" style:family="paragraph" style:parent-style-name="List_20_Paragraph" style:list-style-name="WWNum2">
      <style:paragraph-properties fo:margin-top="0cm" fo:margin-bottom="0.141cm" style:contextual-spacing="false"/>
      <style:text-properties officeooo:paragraph-rsid="0016e3e8"/>
    </style:style>
    <style:style style:name="T1" style:family="text">
      <style:text-properties officeooo:rsid="001c97bd"/>
    </style:style>
    <style:style style:name="T2" style:family="text">
      <style:text-properties fo:color="#5f5e5a" loext:opacity="100%"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officeooo:rsid="001a14d4" style:font-weight-asian="normal" style:font-weight-complex="normal"/>
    </style:style>
    <style:style style:name="T5" style:family="text">
      <style:text-properties fo:color="#5f5e5a" loext:opacity="100%" fo:font-style="normal" fo:font-weight="normal" officeooo:rsid="001a14d4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a14d4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color="#5f5e5a" loext:opacity="100%" fo:font-style="italic" style:font-style-asian="italic" style:font-style-complex="italic"/>
    </style:style>
    <style:style style:name="T9" style:family="text">
      <style:text-properties fo:color="#042c53" loext:opacity="100%" fo:font-size="9pt" fo:font-weight="bold" fo:background-color="#e6f1fb" loext:char-shading-value="0" style:font-size-asian="9pt" style:font-weight-asian="bold" style:font-size-complex="9pt" style:font-weight-complex="bold"/>
    </style:style>
    <style:style style:name="T10" style:family="text">
      <style:text-properties fo:font-weight="bold" officeooo:rsid="001ad577" style:font-weight-asian="bold" style:font-weight-complex="bold"/>
    </style:style>
    <style:style style:name="T11" style:family="text">
      <style:text-properties officeooo:rsid="001ad577"/>
    </style:style>
    <style:style style:name="T12" style:family="text">
      <style:text-properties fo:color="#5f5e5a" loext:opacity="100%" fo:font-style="normal" fo:font-weight="normal" officeooo:rsid="001c97bd" style:font-style-asian="normal" style:font-weight-asian="normal" style:font-style-complex="normal" style:font-weight-complex="normal"/>
    </style:style>
    <style:style style:name="T13" style:family="text">
      <style:text-properties fo:font-weight="normal" officeooo:rsid="001c97bd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/>
      <text:h text:style-name="P2" text:outline-level="2">Ficha de <text:span text:style-name="T1">Eduardo Hernández</text:span></text:h>
      <text:p text:style-name="P3"><text:span text:style-name="T2">Duplica esta sección tantas veces como personas hayan participado en la adquisición de datos. Rellena cada campo; deja en blanco solo lo que no aplique.</text:span></text:p>
      <text:h text:style-name="P4" text:outline-level="3">Identificación</text:h>
      <text:p text:style-name="P5"><text:span text:style-name="T3">Nombre: </text:span><text:span text:style-name="T4">Eduardo Hernández</text:span></text:p>
      <text:p text:style-name="P5"><text:span text:style-name="T3">Rol / equipo: </text:span><text:span text:style-name="T5">Obtención de Registros y cumplimiento de las relaciones de la BBDD</text:span></text:p>
      <text:p text:style-name="P5"><text:span text:style-name="T3">Responsable directo: </text:span><text:span text:style-name="T5">Raúl Marcos</text:span></text:p>
      <text:p text:style-name="P5"><text:span text:style-name="T3">Fase del proyecto: </text:span><text:span text:style-name="T5">Fase de desarrollo</text:span></text:p>
      <text:p text:style-name="P5"><text:span text:style-name="T3">Periodo de trabajo: </text:span><text:span text:style-name="T4">06/07/2026 - 16/07/2026</text:span></text:p>
      <text:h text:style-name="P4" text:outline-level="3">Qué hace (adquisición de datos): <text:span text:style-name="T6">Eduardo</text:span><text:span text:style-name="T7"> recopiló y cargó la documentación de los eventos mediante la plataforma interna, con el objetivo de completar los registros de la base de datos antes de su validación.</text:span></text:h>
      <text:h text:style-name="P4" text:outline-level="3">Fuentes y método de obtención</text:h>
      <text:p text:style-name="P5"><text:span text:style-name="T3">Fuentes de datos: </text:span><text:span text:style-name="T8">[Ej. documentos de ponentes, formularios, correos, archivos externos]</text:span></text:p>
      <text:p text:style-name="P5"><text:span text:style-name="T3">Herramienta o canal utilizado: </text:span><text:span text:style-name="T8">[Ej. plataforma interna, hoja de cálculo, email, Telegram]</text:span></text:p>
      <text:h text:style-name="P4" text:outline-level="3">Verificación y validación</text:h>
      <text:p text:style-name="P3"><text:span text:style-name="T2">Pasos seguidos para confirmar que los datos son correctos antes de incorporarlos a la base de datos.</text:span></text:p>
      <text:list text:style-name="WWNum2">
        <text:list-item>
          <text:p text:style-name="P6"><text:span text:style-name="T9"><text:s/></text:span><text:span text:style-name="T10">Eduardo</text:span><text:span text:style-name="T11">: Verificar la existencia de todas las tablas y campos de la base de datos y la presencia de Nulls donde los datos no se podían verificar con fuentes públicas. Cada tabla tiene su número de campos y ellos su correspondiente número de registros, entre tres y 120 según el caso. El número base era 40 para ser representativo, y en el caso del espacio y las salas, se restringe al ámbito geográfico del País Vasco, según información aportada por el cliente. </text:span></text:p>
        </text:list-item>
      </text:list>
      <text:h text:style-name="P4" text:outline-level="3">Traspaso / entrega</text:h>
      <text:p text:style-name="P5"><text:span text:style-name="T3">A quién se entrega: </text:span><text:span text:style-name="T5">Rafa de Full Stack para su depuración e integración en la Base de Datos.</text:span></text:p>
      <text:p text:style-name="P5"><text:span text:style-name="T3">Formato de entrega: </text:span><text:span text:style-name="T12">9 CSV correspondientes a cada una de las tablas de la Base de Datos.</text:span></text:p>
      <text:h text:style-name="P4" text:outline-level="3">Indicadores y notas:<text:line-break/><text:span text:style-name="T13">Los datos son reales y de fuentes públicas, pero no pertenecen a la base de datos de Mitumi. Se han creado ex-profeso para el desarrollo de la aplicación y se irán nutriendo con los datos reales <text:s/>de la empresa.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282cm" fo:margin-bottom="0.141cm" style:contextual-spacing="false"/>
      <style:text-properties fo:color="#2c2c2a" loext:opacity="100%" style:font-name="Arial1" fo:font-family="Arial" style:font-family-generic="swiss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247cm" style:contextual-spacing="false"/>
      <style:text-properties fo:color="#2c2c2a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List_20_Paragraph" style:display-name="List Paragraph" style:family="paragraph"/>
    <style:style style:name="ListLabel_20_10" style:display-name="ListLabel 1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529cm" fo:margin-left="0.741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09T12:52:01.291225200</meta:creation-date>
    <dc:date>2026-07-09T12:52:28.892683500</dc:date>
    <meta:editing-duration>PT27S</meta:editing-duration>
    <meta:editing-cycles>1</meta:editing-cycles>
    <meta:document-statistic meta:table-count="0" meta:image-count="0" meta:object-count="0" meta:page-count="1" meta:paragraph-count="19" meta:word-count="308" meta:character-count="1840" meta:non-whitespace-character-count="1549"/>
    <meta:generator>LibreOffice/26.2.4.2$Windows_X86_64 LibreOffice_project/0229ac93fcf0d7cbc6376066c6f35021cef002dc</meta:generator>
  </office:meta>
</office:document-meta>
</file>